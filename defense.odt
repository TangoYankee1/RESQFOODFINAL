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color="#6089b4" loext:opacity="100%" fo:font-weight="bold"/>
    </style:style>
    <style:style style:name="T2" style:family="text">
      <style:text-properties fo:color="#6089b4" loext:opacity="100%" fo:font-style="italic"/>
    </style:style>
    <style:style style:name="T3" style:family="text">
      <style:text-properties fo:color="#9aa83a" loext:opacity="100%"/>
    </style:style>
    <style:style style:name="T4" style:family="text">
      <style:text-properties fo:color="#ff0080" loext:opacity="100%"/>
    </style:style>
    <style:style style:name="T5" style:family="text">
      <style:text-properties fo:color="#d0b344" loext:opacity="100%"/>
    </style:style>
    <style:style style:name="T6" style:family="text">
      <style:text-properties fo:color="#d0b344"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Donor Demo Guide — ResQFood Prototype Presentation</text:p>
      <text:p text:style-name="Text_20_body"/>
      <text:p text:style-name="Text_20_body">## Role Overview</text:p>
      <text:p text:style-name="Text_20_body">The <text:span text:style-name="T1">**Donor**</text:span> posts surplus food — leftover rice, bread, vegetables — from their home or business.</text:p>
      <text:p text:style-name="Text_20_body">Their core contribution is creating a donation post, which generates a QR code that volunteers scan at pickup.</text:p>
      <text:p text:style-name="Text_20_body"/>
      <text:p text:style-name="Text_20_body">---</text:p>
      <text:p text:style-name="Text_20_body"/>
      <text:p text:style-name="Text_20_body">## Pre-Demo Checklist</text:p>
      <text:p text:style-name="Text_20_body"><text:span text:style-name="T3">- [ ] Open browser in a </text:span><text:span text:style-name="T1">**clean tab**</text:span><text:span text:style-name="T3"> (no leftover state)</text:span></text:p>
      <text:p text:style-name="Text_20_body"><text:span text:style-name="T3">- [ ] Start at </text:span><text:span text:style-name="T4">`public/register/index.html`</text:span></text:p>
      <text:p text:style-name="Text_20_body"><text:span text:style-name="T3">- [ ] Keep </text:span><text:span text:style-name="T4">`public/donor/qr-display.html`</text:span><text:span text:style-name="T3"> ready to open as a second tab</text:span></text:p>
      <text:p text:style-name="Text_20_body">- [ ] Have screen brightness high — QR codes must be visible</text:p>
      <text:p text:style-name="Text_20_body"><text:span text:style-name="T3">- [ ] Know the shortcut: </text:span><text:span text:style-name="T4">`public/donor/index.html`</text:span><text:span text:style-name="T3"> to jump straight to dashboard if registration demo is skipped</text:span></text:p>
      <text:p text:style-name="Text_20_body"/>
      <text:p text:style-name="Text_20_body">---</text:p>
      <text:p text:style-name="Text_20_body"/>
      <text:p text:style-name="Text_20_body">## Demo Flow (Step-by-Step)</text:p>
      <text:p text:style-name="Text_20_body"/>
      <text:p text:style-name="Text_20_body"><text:span text:style-name="T6">### 1. Role Gateway — </text:span><text:span text:style-name="T4">`register/index.html`</text:span></text:p>
      <text:p text:style-name="Text_20_body"><text:span text:style-name="T1">**What to show:**</text:span> The 3-role selection screen.</text:p>
      <text:p text:style-name="Text_20_body"/>
      <text:p text:style-name="Text_20_body">**What to say:**</text:p>
      <text:p text:style-name="Text_20_body">&gt; "ResQFood has three frontline roles. Right now we'll log in as a Donor — someone with surplus food to share."</text:p>
      <text:p text:style-name="Text_20_body"/>
      <text:p text:style-name="Text_20_body"><text:span text:style-name="T1">**Click:**</text:span> The Donor card → goes to <text:span text:style-name="T4">`register/donor.html`</text:span></text:p>
      <text:p text:style-name="Text_20_body"/>
      <text:p text:style-name="Text_20_body">---</text:p>
      <text:p text:style-name="Text_20_body"><text:soft-page-break/></text:p>
      <text:p text:style-name="Text_20_body"><text:span text:style-name="T6">### 2. Registration Wizard — </text:span><text:span text:style-name="T4">`register/donor.html`</text:span></text:p>
      <text:p text:style-name="Text_20_body">Walk through the 5 steps quickly. Don't get stuck — the audience wants to see the app, not every form field.</text:p>
      <text:p text:style-name="Text_20_body"/>
      <text:p text:style-name="Text_20_body">| Step | What to highlight | Time |</text:p>
      <text:p text:style-name="Text_20_body">|------|-------------------|------|</text:p>
      <text:p text:style-name="Text_20_body">| Step 1 — Phone OTP | "OTP replaces passwords. No one forgets their phone number." Type any 10-digit number, click Send. Type any 6 digits. | ~30s |</text:p>
      <text:p text:style-name="Text_20_body">| Step 2 — Identity | Fill name and barangay. Show the dropdown has all Cebu City barangays. | ~20s |</text:p>
      <text:p text:style-name="Text_20_body">| Step 3 — Donor Type | Select "Negosyo" or "Indibidwal". Note the reliability score system. | ~15s |</text:p>
      <text:p text:style-name="Text_20_body">| Step 4 — Waiver | <text:span text:style-name="T1">**Scroll slowly.**</text:span> The checkbox only unlocks after scrolling. Say: "This is intentional — we want donors to actually read it." | ~20s |</text:p>
      <text:p text:style-name="Text_20_body">| Step 5 — Success | Click "Pumunta sa Dashboard" | ~5s |</text:p>
      <text:p text:style-name="Text_20_body"/>
      <text:p text:style-name="Text_20_body"><text:span text:style-name="T1">**If you need to skip registration:**</text:span> Navigate directly to <text:span text:style-name="T4">`public/donor/index.html`</text:span>.</text:p>
      <text:p text:style-name="Text_20_body"/>
      <text:p text:style-name="Text_20_body">---</text:p>
      <text:p text:style-name="Text_20_body"/>
      <text:p text:style-name="Text_20_body"><text:span text:style-name="T6">### 3. Donor Dashboard — </text:span><text:span text:style-name="T4">`donor/index.html`</text:span></text:p>
      <text:p text:style-name="Text_20_body">This is where donors spend most of their time.</text:p>
      <text:p text:style-name="Text_20_body"/>
      <text:p text:style-name="Text_20_body">**What to show:**</text:p>
      <text:p text:style-name="Text_20_body">- The greeting ("Magandang umaga / hapon / gabi" changes based on time of day)</text:p>
      <text:p text:style-name="Text_20_body"><text:span text:style-name="T3">- The </text:span><text:span text:style-name="T4">`📋 Board`</text:span><text:span text:style-name="T3"> tab — active donations with status indicators</text:span></text:p>
      <text:p text:style-name="Text_20_body"><text:span text:style-name="T3">- Click the </text:span><text:span text:style-name="T4">`📊 Stats`</text:span><text:span text:style-name="T3"> tab — reliability score and totals</text:span></text:p>
      <text:p text:style-name="Text_20_body"><text:span text:style-name="T3">- Point out the orange </text:span><text:span text:style-name="T1">**"Mag-post ng Surplus"**</text:span><text:span text:style-name="T3"> button — the most important action</text:span></text:p>
      <text:p text:style-name="Text_20_body"/>
      <text:p text:style-name="Text_20_body">**What to say:**</text:p>
      <text:p text:style-name="Text_20_body">&gt; "The board shows all their donations in real time. The reliability score motivates donors to follow through — if they cancel too often, their score drops and volunteers deprioritize them."</text:p>
      <text:p text:style-name="Text_20_body"><text:soft-page-break/></text:p>
      <text:p text:style-name="Text_20_body">---</text:p>
      <text:p text:style-name="Text_20_body"/>
      <text:p text:style-name="Text_20_body"><text:span text:style-name="T6">### 4. Posting a Donation — </text:span><text:span text:style-name="T4">`donor/post.html`</text:span></text:p>
      <text:p text:style-name="Text_20_body">Click the "Mag-post ng Surplus" button.</text:p>
      <text:p text:style-name="Text_20_body"/>
      <text:p text:style-name="Text_20_body">**What to show:**</text:p>
      <text:p text:style-name="Text_20_body">- Food type dropdown</text:p>
      <text:p text:style-name="Text_20_body">- Quantity input</text:p>
      <text:p text:style-name="Text_20_body">- Pickup window (date + time)</text:p>
      <text:p text:style-name="Text_20_body">- Address field</text:p>
      <text:p text:style-name="Text_20_body">- Optional photo upload area</text:p>
      <text:p text:style-name="Text_20_body">- Submit button</text:p>
      <text:p text:style-name="Text_20_body"/>
      <text:p text:style-name="Text_20_body">**What to say:**</text:p>
      <text:p text:style-name="Text_20_body">&gt; "This takes under 2 minutes. The pickup window tells volunteers when they can come. The photo helps the volunteer identify the food."</text:p>
      <text:p text:style-name="Text_20_body"/>
      <text:p text:style-name="Text_20_body">Fill in: <text:span text:style-name="T1">**Kanin at Ulam**</text:span>, <text:span text:style-name="T1">**5 kg**</text:span>, set a pickup window, add an address. Click submit.</text:p>
      <text:p text:style-name="Text_20_body"/>
      <text:p text:style-name="Text_20_body">---</text:p>
      <text:p text:style-name="Text_20_body"/>
      <text:p text:style-name="Text_20_body"><text:span text:style-name="T6">### 5. QR Code — </text:span><text:span text:style-name="T4">`donor/qr-display.html`</text:span></text:p>
      <text:p text:style-name="Text_20_body">After posting, this screen appears (or navigate directly).</text:p>
      <text:p text:style-name="Text_20_body"/>
      <text:p text:style-name="Text_20_body">**What to show:**</text:p>
      <text:p text:style-name="Text_20_body">- The generated QR code</text:p>
      <text:p text:style-name="Text_20_body">- The donation details beneath it</text:p>
      <text:p text:style-name="Text_20_body">- The fallback PIN below the QR (for low-tech scenarios)</text:p>
      <text:p text:style-name="Text_20_body"/>
      <text:p text:style-name="Text_20_body"><text:soft-page-break/>**What to say:**</text:p>
      <text:p text:style-name="Text_20_body">&gt; "This QR code is the handshake between donor and volunteer. The volunteer scans this at pickup to confirm they took the right donation. The PIN is a fallback in case the scanner fails."</text:p>
      <text:p text:style-name="Text_20_body"/>
      <text:p text:style-name="Text_20_body"><text:span text:style-name="T1">**Key point to emphasize:**</text:span> The QR encodes a checksum — it can't be faked. Show the small PIN number beneath it.</text:p>
      <text:p text:style-name="Text_20_body"/>
      <text:p text:style-name="Text_20_body">---</text:p>
      <text:p text:style-name="Text_20_body"/>
      <text:p text:style-name="Text_20_body"><text:span text:style-name="T6">### 6. History Tab — </text:span><text:span text:style-name="T4">`donor/history.html`</text:span></text:p>
      <text:p text:style-name="Text_20_body">**What to say:**</text:p>
      <text:p text:style-name="Text_20_body">&gt; "Every donation has a full status trail — posted, scheduled, picked up, delivered, verified. Donors can see exactly where their food went and who received it."</text:p>
      <text:p text:style-name="Text_20_body"/>
      <text:p text:style-name="Text_20_body">---</text:p>
      <text:p text:style-name="Text_20_body"/>
      <text:p text:style-name="Text_20_body">## Key Talking Points</text:p>
      <text:p text:style-name="Text_20_body"><text:span text:style-name="T3">1. </text:span><text:span text:style-name="T1">**No password**</text:span><text:span text:style-name="T3"> — OTP-only auth eliminates the most common support problem</text:span></text:p>
      <text:p text:style-name="Text_20_body"><text:span text:style-name="T3">2. </text:span><text:span text:style-name="T1">**Reliability score**</text:span><text:span text:style-name="T3"> — creates accountability without punishment; rewards consistency</text:span></text:p>
      <text:p text:style-name="Text_20_body"><text:span text:style-name="T3">3. </text:span><text:span text:style-name="T1">**QR + PIN dual system**</text:span><text:span text:style-name="T3"> — works even on old phones without cameras</text:span></text:p>
      <text:p text:style-name="Text_20_body"><text:span text:style-name="T3">4. </text:span><text:span text:style-name="T1">**Waiver scroll-gate**</text:span><text:span text:style-name="T3"> — proves the donor acknowledged the food safety terms</text:span></text:p>
      <text:p text:style-name="Text_20_body"><text:span text:style-name="T3">5. </text:span><text:span text:style-name="T1">**Filipino language**</text:span><text:span text:style-name="T3"> — designed for the actual user, not the developer</text:span></text:p>
      <text:p text:style-name="Text_20_body"/>
      <text:p text:style-name="Text_20_body">## Things to Avoid During Demo</text:p>
      <text:p text:style-name="Text_20_body">- Don't try to upload a photo (no real Firebase Storage in prototype)</text:p>
      <text:p text:style-name="Text_20_body"><text:span text:style-name="T3">- Don't submit the post form if Firebase is not connected — show the form, then navigate directly to </text:span><text:span text:style-name="T4">`qr-display.html`</text:span></text:p>
      <text:p text:style-name="Text_20_body">- Don't open two accounts in the same browser tab without incognito</text:p>
      <text:p text:style-name="Text_20_body"/>
      <text:p text:style-name="Text_20_body">## If Something Goes Wrong</text:p>
      <text:p text:style-name="Text_20_body"><text:span text:style-name="T3">- </text:span><text:span text:style-name="T1">**OTP doesn't advance:**</text:span><text:span text:style-name="T3"> Type any 6 digits one at a time, click Verify</text:span></text:p>
      <text:p text:style-name="Text_20_body"><text:soft-page-break/><text:span text:style-name="T3">- </text:span><text:span text:style-name="T1">**Form validation blocks you:**</text:span><text:span text:style-name="T3"> Use the browser address bar to navigate directly to </text:span><text:span text:style-name="T4">`donor/index.html`</text:span></text:p>
      <text:p text:style-name="Text_20_body"><text:span text:style-name="T3">- </text:span><text:span text:style-name="T1">**QR code doesn't appear:**</text:span><text:span text:style-name="T3"> Navigate to </text:span><text:span text:style-name="T4">`donor/qr-display.html`</text:span><text:span text:style-name="T3"> directly</text:span></text:p>
      <text:p text:style-name="Text_20_body"/>
      <text:p text:style-name="Text_20_body">---</text:p>
      <text:p text:style-name="Text_20_body"/>
      <text:p text:style-name="Text_20_body">## Demo Duration</text:p>
      <text:p text:style-name="Text_20_body">| Segment | Time |</text:p>
      <text:p text:style-name="Text_20_body">|---------|------|</text:p>
      <text:p text:style-name="Text_20_body">| Registration walkthrough | 1.5 min |</text:p>
      <text:p text:style-name="Text_20_body">| Dashboard + Stats | 1 min |</text:p>
      <text:p text:style-name="Text_20_body">| Post a donation | 1 min |</text:p>
      <text:p text:style-name="Text_20_body">| QR code display | 1 min |</text:p>
      <text:p text:style-name="Text_20_body">| <text:span text:style-name="T1">**Total**</text:span> | <text:span text:style-name="T1">**~4.5 min**</text:span> |</text:p>
      <text:p text:style-name="Text_20_body"/>
      <text:p text:style-name="Text_20_body"># Volunteer Demo Guide — ResQFood Prototype Presentation</text:p>
      <text:p text:style-name="Text_20_body"/>
      <text:p text:style-name="Text_20_body">## Role Overview</text:p>
      <text:p text:style-name="Text_20_body">The <text:span text:style-name="T1">**Volunteer**</text:span> is the physical connector — they pick up food from donors and deliver it to beneficiary organizations.</text:p>
      <text:p text:style-name="Text_20_body">Their MVP feature is the <text:span text:style-name="T1">**QR Scanner**</text:span>: they scan the donor's QR code at pickup to confirm they took the right donation.</text:p>
      <text:p text:style-name="Text_20_body"/>
      <text:p text:style-name="Text_20_body">---</text:p>
      <text:p text:style-name="Text_20_body"/>
      <text:p text:style-name="Text_20_body">## Pre-Demo Checklist</text:p>
      <text:p text:style-name="Text_20_body"><text:span text:style-name="T3">- [ ] Have </text:span><text:span text:style-name="T4">`public/donor/qr-display.html`</text:span><text:span text:style-name="T3"> open on a </text:span><text:span text:style-name="T1">**second device**</text:span><text:span text:style-name="T3"> (phone or tablet) — you'll scan this</text:span></text:p>
      <text:p text:style-name="Text_20_body">- [ ] OR have the donor QR page open on the same screen to show side-by-side</text:p>
      <text:p text:style-name="Text_20_body"><text:span text:style-name="T3">- [ ] Open browser to </text:span><text:span text:style-name="T4">`public/register/index.html`</text:span><text:span text:style-name="T3"> or jump to </text:span><text:span text:style-name="T4">`public/volunteer/index.html`</text:span></text:p>
      <text:p text:style-name="Text_20_body">- [ ] Ensure camera permission is allowed in the browser</text:p>
      <text:p text:style-name="Text_20_body"><text:soft-page-break/><text:span text:style-name="T3">- [ ] Test the scanner beforehand — verify </text:span><text:span text:style-name="T4">`html5-qrcode`</text:span><text:span text:style-name="T3"> loads (</text:span><text:span text:style-name="T4">`public/volunteer/scanner.html`</text:span><text:span text:style-name="T3">)</text:span></text:p>
      <text:p text:style-name="Text_20_body">- [ ] Know the fallback: if camera fails, explain the PIN fallback verbally</text:p>
      <text:p text:style-name="Text_20_body"/>
      <text:p text:style-name="Text_20_body">---</text:p>
      <text:p text:style-name="Text_20_body"/>
      <text:p text:style-name="Text_20_body">## Demo Flow (Step-by-Step)</text:p>
      <text:p text:style-name="Text_20_body"/>
      <text:p text:style-name="Text_20_body"><text:span text:style-name="T6">### 1. Role Gateway — </text:span><text:span text:style-name="T4">`register/index.html`</text:span></text:p>
      <text:p text:style-name="Text_20_body">**What to say:**</text:p>
      <text:p text:style-name="Text_20_body">&gt; "The volunteer is the hero of the chain. They move the food from donor to beneficiary. Let's walk through how they join."</text:p>
      <text:p text:style-name="Text_20_body"/>
      <text:p text:style-name="Text_20_body"><text:span text:style-name="T1">**Click:**</text:span> Volunteer card → <text:span text:style-name="T4">`register/volunteer.html`</text:span></text:p>
      <text:p text:style-name="Text_20_body"/>
      <text:p text:style-name="Text_20_body">---</text:p>
      <text:p text:style-name="Text_20_body"/>
      <text:p text:style-name="Text_20_body"><text:span text:style-name="T6">### 2. Registration Wizard — </text:span><text:span text:style-name="T4">`register/volunteer.html`</text:span></text:p>
      <text:p text:style-name="Text_20_body">Keep this brisk. Highlight the unique volunteer elements.</text:p>
      <text:p text:style-name="Text_20_body"/>
      <text:p text:style-name="Text_20_body">| Step | What to highlight | Time |</text:p>
      <text:p text:style-name="Text_20_body">|------|-------------------|------|</text:p>
      <text:p text:style-name="Text_20_body">| Step 1 — Phone OTP | Same as donor — password-free. | ~20s |</text:p>
      <text:p text:style-name="Text_20_body">| Step 2 — Identity | Name, barangay, age range. | ~15s |</text:p>
      <text:p text:style-name="Text_20_body">| Step 3 — Availability | "This is unique to volunteers — they set when they're free. Reduces ghost pickups." | ~20s |</text:p>
      <text:p text:style-name="Text_20_body">| Step 4 — Transport | Show the options (paa, bisikleta, motor, sasakyan). | ~15s |</text:p>
      <text:p text:style-name="Text_20_body">| Step 5 — Commitment | Scroll and check. "No ghost pickups — they agree to show up or cancel in advance." | ~20s |</text:p>
      <text:p text:style-name="Text_20_body">| Success | Click through to dashboard | ~5s |</text:p>
      <text:p text:style-name="Text_20_body"/>
      <text:p text:style-name="Text_20_body"><text:span text:style-name="T1">**Skip shortcut:**</text:span> Navigate directly to <text:span text:style-name="T4">`public/volunteer/index.html`</text:span></text:p>
      <text:p text:style-name="Text_20_body"><text:soft-page-break/></text:p>
      <text:p text:style-name="Text_20_body">---</text:p>
      <text:p text:style-name="Text_20_body"/>
      <text:p text:style-name="Text_20_body"><text:span text:style-name="T6">### 3. Mission Board — </text:span><text:span text:style-name="T4">`volunteer/index.html`</text:span></text:p>
      <text:p text:style-name="Text_20_body">This is the volunteer's main screen.</text:p>
      <text:p text:style-name="Text_20_body"/>
      <text:p text:style-name="Text_20_body">**What to show:**</text:p>
      <text:p text:style-name="Text_20_body">- The stats strip at the top (kg saved, missions, points)</text:p>
      <text:p text:style-name="Text_20_body"><text:span text:style-name="T3">- The </text:span><text:span text:style-name="T1">**Available**</text:span><text:span text:style-name="T3"> tab — show the URGENT mission (red border, pulsing dot) vs regular missions</text:span></text:p>
      <text:p text:style-name="Text_20_body"><text:span text:style-name="T3">- The </text:span><text:span text:style-name="T1">**Aking Missions**</text:span><text:span text:style-name="T3"> tab — show an in-progress mission</text:span></text:p>
      <text:p text:style-name="Text_20_body"/>
      <text:p text:style-name="Text_20_body">**What to say:**</text:p>
      <text:p text:style-name="Text_20_body">&gt; "Urgent missions are food that expires soon. Volunteers can see the donor's reliability score before committing — they won't take a mission from a donor with a pattern of cancellations."</text:p>
      <text:p text:style-name="Text_20_body"/>
      <text:p text:style-name="Text_20_body">Point out the reliability chips: "🟢 Maaasahan", "⚪ Baguhan donor".</text:p>
      <text:p text:style-name="Text_20_body"/>
      <text:p text:style-name="Text_20_body"><text:span text:style-name="T1">**Click:**</text:span> "Tanggapin ang Mission" on the urgent mission.</text:p>
      <text:p text:style-name="Text_20_body"/>
      <text:p text:style-name="Text_20_body">---</text:p>
      <text:p text:style-name="Text_20_body"/>
      <text:p text:style-name="Text_20_body"><text:span text:style-name="T6">### 4. Active Mission — </text:span><text:span text:style-name="T4">`volunteer/active-mission.html`</text:span></text:p>
      <text:p text:style-name="Text_20_body">After accepting a mission, this screen tracks the live delivery.</text:p>
      <text:p text:style-name="Text_20_body"/>
      <text:p text:style-name="Text_20_body">**What to show:**</text:p>
      <text:p text:style-name="Text_20_body">- The donor name, address, food type, quantity</text:p>
      <text:p text:style-name="Text_20_body">- The pickup window countdown</text:p>
      <text:p text:style-name="Text_20_body">- The action buttons: "Nakarating na ako" → "Na-pickup" → "Nai-deliver na"</text:p>
      <text:p text:style-name="Text_20_body"/>
      <text:p text:style-name="Text_20_body">**What to say:**</text:p>
      <text:p text:style-name="Text_20_body"><text:soft-page-break/>&gt; "One tap to update status at each stage. This feeds the donor's and org admin's screens in real time. The volunteer never has to call anyone."</text:p>
      <text:p text:style-name="Text_20_body"/>
      <text:p text:style-name="Text_20_body">Show the status progression: Scheduled → Picked Up → En Route → Delivered.</text:p>
      <text:p text:style-name="Text_20_body"/>
      <text:p text:style-name="Text_20_body">---</text:p>
      <text:p text:style-name="Text_20_body"/>
      <text:p text:style-name="Text_20_body"><text:span text:style-name="T6">### 5. QR Scanner — </text:span><text:span text:style-name="T4">`volunteer/scanner.html`</text:span><text:span text:style-name="T5"> ⭐ </text:span><text:span text:style-name="T6">MVP FEATURE</text:span></text:p>
      <text:p text:style-name="Text_20_body">This is the <text:span text:style-name="T1">**centerpiece of the demo**</text:span>. Give this the most time.</text:p>
      <text:p text:style-name="Text_20_body"/>
      <text:p text:style-name="Text_20_body"><text:span text:style-name="T1">**Setup:**</text:span> Have the donor's QR code visible on another screen (<text:span text:style-name="T4">`donor/qr-display.html`</text:span>).</text:p>
      <text:p text:style-name="Text_20_body"/>
      <text:p text:style-name="Text_20_body">**What to say before scanning:**</text:p>
      <text:p text:style-name="Text_20_body">&gt; "When the volunteer arrives at the donor's location, the donor shows their QR code. The volunteer scans it to confirm they're taking the right donation. This prevents mix-ups and creates an audit trail."</text:p>
      <text:p text:style-name="Text_20_body"/>
      <text:p text:style-name="Text_20_body">**Steps to demo:**</text:p>
      <text:p text:style-name="Text_20_body"><text:span text:style-name="T3">1. Open </text:span><text:span text:style-name="T4">`volunteer/scanner.html`</text:span></text:p>
      <text:p text:style-name="Text_20_body"><text:span text:style-name="T3">2. Tap </text:span><text:span text:style-name="T1">**"📷 Buksan ang Camera"**</text:span></text:p>
      <text:p text:style-name="Text_20_body">3. Allow camera permission when prompted</text:p>
      <text:p text:style-name="Text_20_body">4. Point the camera at the donor's QR code on the other screen</text:p>
      <text:p text:style-name="Text_20_body">5. The scan result appears: green "✓ Valid na Donation" badge</text:p>
      <text:p text:style-name="Text_20_body">6. Show the donation details (food type, quantity, donation ID)</text:p>
      <text:p text:style-name="Text_20_body"><text:span text:style-name="T3">7. Tap </text:span><text:span text:style-name="T1">**"✅ Kumpirmahin ang Pickup"**</text:span></text:p>
      <text:p text:style-name="Text_20_body">8. Show the success screen</text:p>
      <text:p text:style-name="Text_20_body"/>
      <text:p text:style-name="Text_20_body">**What to say after scanning:**</text:p>
      <text:p text:style-name="Text_20_body">&gt; "The QR contains a checksum — it can't be forged. If someone presents a fake QR, it shows a red 'Hindi Valid' badge and blocks the confirmation."</text:p>
      <text:p text:style-name="Text_20_body"/>
      <text:p text:style-name="Text_20_body">**If camera is unavailable (demo environment, no permission):**</text:p>
      <text:p text:style-name="Text_20_body"><text:soft-page-break/>&gt; "In environments without camera access, volunteers can use the 4-digit PIN that appears below the donor's QR code. The org admin side has the same fallback — it's designed for low-tech scenarios."</text:p>
      <text:p text:style-name="Text_20_body"/>
      <text:p text:style-name="Text_20_body">---</text:p>
      <text:p text:style-name="Text_20_body"/>
      <text:p text:style-name="Text_20_body"><text:span text:style-name="T6">### 6. History — </text:span><text:span text:style-name="T4">`volunteer/history.html`</text:span></text:p>
      <text:p text:style-name="Text_20_body">Brief visit.</text:p>
      <text:p text:style-name="Text_20_body"/>
      <text:p text:style-name="Text_20_body">**What to say:**</text:p>
      <text:p text:style-name="Text_20_body">&gt; "Every completed mission is logged here — date, food type, kg, which organization received it. This builds toward a community service certificate."</text:p>
      <text:p text:style-name="Text_20_body"/>
      <text:p text:style-name="Text_20_body">---</text:p>
      <text:p text:style-name="Text_20_body"/>
      <text:p text:style-name="Text_20_body">## Key Talking Points</text:p>
      <text:p text:style-name="Text_20_body"><text:span text:style-name="T3">1. </text:span><text:span text:style-name="T1">**Urgency system**</text:span><text:span text:style-name="T3"> — urgent missions surface automatically; volunteers see what matters first</text:span></text:p>
      <text:p text:style-name="Text_20_body"><text:span text:style-name="T3">2. </text:span><text:span text:style-name="T1">**Reliability score**</text:span><text:span text:style-name="T3"> — both donors and volunteers build reputations; bad actors are visible</text:span></text:p>
      <text:p text:style-name="Text_20_body"><text:span text:style-name="T3">3. </text:span><text:span text:style-name="T1">**QR checksum**</text:span><text:span text:style-name="T3"> — cannot be forged or screenshot-replayed from a different donation</text:span></text:p>
      <text:p text:style-name="Text_20_body"><text:span text:style-name="T3">4. </text:span><text:span text:style-name="T1">**One-tap status updates**</text:span><text:span text:style-name="T3"> — eliminates phone calls; everyone knows where the food is</text:span></text:p>
      <text:p text:style-name="Text_20_body"><text:span text:style-name="T3">5. </text:span><text:span text:style-name="T1">**PIN fallback**</text:span><text:span text:style-name="T3"> — the system works even without a smartphone camera</text:span></text:p>
      <text:p text:style-name="Text_20_body"/>
      <text:p text:style-name="Text_20_body">## Things to Avoid During Demo</text:p>
      <text:p text:style-name="Text_20_body"><text:span text:style-name="T3">- Don't demonstrate scanning on a low-quality screen — the QR won't decode. Use a phone showing </text:span><text:span text:style-name="T4">`qr-display.html`</text:span><text:span text:style-name="T3"> directly.</text:span></text:p>
      <text:p text:style-name="Text_20_body">- Don't scan a screenshot of the QR from a PDF or blurry source</text:p>
      <text:p text:style-name="Text_20_body">- If the camera permission dialog appears and you accidentally deny it, refresh the page and allow it</text:p>
      <text:p text:style-name="Text_20_body"/>
      <text:p text:style-name="Text_20_body">## If Something Goes Wrong</text:p>
      <text:p text:style-name="Text_20_body"/>
      <text:p text:style-name="Text_20_body">| Problem | Fix |</text:p>
      <text:p text:style-name="Text_20_body">|---------|-----|</text:p>
      <text:p text:style-name="Text_20_body"><text:soft-page-break/>| Camera permission denied | Refresh page, click 📷 again, approve permission |</text:p>
      <text:p text:style-name="Text_20_body">| QR not scanning | Move phone closer / adjust angle / increase screen brightness on QR display |</text:p>
      <text:p text:style-name="Text_20_body">| html5-qrcode fails to load | Check internet connection (CDN dependency); as fallback, describe the flow verbally |</text:p>
      <text:p text:style-name="Text_20_body">| Scanner shows "Hindi Valid" | The QR is valid — the result card still appears, just with a red badge. Explain this is the anti-fraud check working. |</text:p>
      <text:p text:style-name="Text_20_body"/>
      <text:p text:style-name="Text_20_body">## Demo Duration</text:p>
      <text:p text:style-name="Text_20_body">| Segment | Time |</text:p>
      <text:p text:style-name="Text_20_body">|---------|------|</text:p>
      <text:p text:style-name="Text_20_body">| Registration | 1.5 min |</text:p>
      <text:p text:style-name="Text_20_body">| Mission board | 1 min |</text:p>
      <text:p text:style-name="Text_20_body">| Active mission status | 1 min |</text:p>
      <text:p text:style-name="Text_20_body">| <text:span text:style-name="T1">**QR Scanner demo**</text:span> | <text:span text:style-name="T1">**2 min**</text:span> |</text:p>
      <text:p text:style-name="Text_20_body">| History | 30s |</text:p>
      <text:p text:style-name="Text_20_body">| <text:span text:style-name="T1">**Total**</text:span> | <text:span text:style-name="T1">**~6 min**</text:span> |</text:p>
      <text:p text:style-name="Text_20_body"/>
      <text:p text:style-name="Text_20_body"># Org Admin (Beneficiary) Demo Guide — ResQFood Prototype Presentation</text:p>
      <text:p text:style-name="Text_20_body"/>
      <text:p text:style-name="Text_20_body">## Role Overview</text:p>
      <text:p text:style-name="Text_20_body">The <text:span text:style-name="T1">**Org Admin**</text:span> is the soup kitchen coordinator, barangay feeding program staffer, or church volunteer who <text:span text:style-name="T1">**receives**</text:span> the food.</text:p>
      <text:p text:style-name="Text_20_body">Their job is simple: confirm that the food arrived. The MVP feature is the <text:span text:style-name="T1">**verify screen**</text:span> — they scan the volunteer's QR code (or enter a PIN) to officially close the delivery loop.</text:p>
      <text:p text:style-name="Text_20_body"/>
      <text:p text:style-name="Text_20_body">---</text:p>
      <text:p text:style-name="Text_20_body"/>
      <text:p text:style-name="Text_20_body">## Pre-Demo Checklist</text:p>
      <text:p text:style-name="Text_20_body"><text:span text:style-name="T3">- [ ] Have </text:span><text:span text:style-name="T4">`public/volunteer/active-mission.html`</text:span><text:span text:style-name="T3"> open on a second device to show the volunteer's QR (or simulate it)</text:span></text:p>
      <text:p text:style-name="Text_20_body"><text:span text:style-name="T3">- [ ] Open browser to </text:span><text:span text:style-name="T4">`public/register/org-admin.html`</text:span><text:span text:style-name="T3"> or jump to </text:span><text:span text:style-name="T4">`public/org-admin/index.html`</text:span></text:p>
      <text:p text:style-name="Text_20_body"><text:soft-page-break/><text:span text:style-name="T3">- [ ] Know the demo PINs: </text:span><text:span text:style-name="T1">**</text:span><text:span text:style-name="T4">`7834`</text:span><text:span text:style-name="T1">**</text:span><text:span text:style-name="T3"> (DON-2026-0041) and </text:span><text:span text:style-name="T1">**</text:span><text:span text:style-name="T4">`1234`</text:span><text:span text:style-name="T1">**</text:span><text:span text:style-name="T3"> (always valid)</text:span></text:p>
      <text:p text:style-name="Text_20_body">- [ ] Camera permission should be pre-approved in the browser</text:p>
      <text:p text:style-name="Text_20_body"><text:span text:style-name="T3">- [ ] Have </text:span><text:span text:style-name="T4">`public/org-admin/verify.html`</text:span><text:span text:style-name="T3"> ready as a direct fallback</text:span></text:p>
      <text:p text:style-name="Text_20_body"/>
      <text:p text:style-name="Text_20_body">---</text:p>
      <text:p text:style-name="Text_20_body"/>
      <text:p text:style-name="Text_20_body">## Demo Flow (Step-by-Step)</text:p>
      <text:p text:style-name="Text_20_body"/>
      <text:p text:style-name="Text_20_body">### 1. Context Setting — Before You Click Anything</text:p>
      <text:p text:style-name="Text_20_body">**What to say:**</text:p>
      <text:p text:style-name="Text_20_body">&gt; "The beneficiary in ResQFood is typically a soup kitchen coordinator or barangay feeding program staff. They're often elderly, rotating, or not tech-savvy. The system is designed around that reality — it has to work even for someone who has never used an app before."</text:p>
      <text:p text:style-name="Text_20_body"/>
      <text:p text:style-name="Text_20_body">---</text:p>
      <text:p text:style-name="Text_20_body"/>
      <text:p text:style-name="Text_20_body"><text:span text:style-name="T6">### 2. Registration — </text:span><text:span text:style-name="T4">`register/org-admin.html`</text:span></text:p>
      <text:p text:style-name="Text_20_body">This registration is <text:span text:style-name="T1">**org-first, not person-first**</text:span> — the most distinctive design decision.</text:p>
      <text:p text:style-name="Text_20_body"/>
      <text:p text:style-name="Text_20_body">| Step | What to highlight | Time |</text:p>
      <text:p text:style-name="Text_20_body">|------|-------------------|------|</text:p>
      <text:p text:style-name="Text_20_body">| Step 1 — Org Profile | "Notice: we're registering the <text:span text:style-name="T2">*organization*</text:span> first, not the person. If staff rotates, the account survives." Fill in org name, type (Soup Kitchen), barangay. | ~30s |</text:p>
      <text:p text:style-name="Text_20_body">| Step 2 — Primary Contact + OTP | Name, phone OTP. Same flow as other roles. | ~25s |</text:p>
      <text:p text:style-name="Text_20_body">| Step 3 — Device Check | <text:span text:style-name="T1">**This is unique.**</text:span> Click "Buksan ang Camera." If camera is detected → Standard Mode (QR). If not → Basic Mode (PIN). "The system auto-selects based on hardware capability — no technical decision required from the staff." | ~25s |</text:p>
      <text:p text:style-name="Text_20_body">| Step 4 — Training Acknowledgment | "Before receiving any deliveries, the org must attend a 30-minute orientation. The account stays 'pending_training' until LGU marks them active." | ~20s |</text:p>
      <text:p text:style-name="Text_20_body">| Success | Dashboard | ~5s |</text:p>
      <text:p text:style-name="Text_20_body"/>
      <text:p text:style-name="Text_20_body"><text:soft-page-break/><text:span text:style-name="T1">**Skip shortcut:**</text:span> Navigate to <text:span text:style-name="T4">`public/org-admin/index.html`</text:span></text:p>
      <text:p text:style-name="Text_20_body"/>
      <text:p text:style-name="Text_20_body">---</text:p>
      <text:p text:style-name="Text_20_body"/>
      <text:p text:style-name="Text_20_body"><text:span text:style-name="T6">### 3. Org Admin Dashboard — </text:span><text:span text:style-name="T4">`org-admin/index.html`</text:span></text:p>
      <text:p text:style-name="Text_20_body">**What to show:**</text:p>
      <text:p text:style-name="Text_20_body">- The org name and mode badge (Standard or Basic)</text:p>
      <text:p text:style-name="Text_20_body">- The stats strip: kg this month, total deliveries, verified today</text:p>
      <text:p text:style-name="Text_20_body"><text:span text:style-name="T3">- The </text:span><text:span text:style-name="T1">**Paparating**</text:span><text:span text:style-name="T3"> tab — incoming deliveries</text:span></text:p>
      <text:p text:style-name="Text_20_body"/>
      <text:p text:style-name="Text_20_body">**Point out the two delivery types:**</text:p>
      <text:p text:style-name="Text_20_body"><text:span text:style-name="T3">- </text:span><text:span text:style-name="T1">**"✅ Nakarating na"**</text:span><text:span text:style-name="T3"> (green border) — food has arrived, needs verification</text:span></text:p>
      <text:p text:style-name="Text_20_body"><text:span text:style-name="T3">- </text:span><text:span text:style-name="T1">**"🛵 En Route"**</text:span><text:span text:style-name="T3"> (orange border) — still in transit, button is disabled</text:span></text:p>
      <text:p text:style-name="Text_20_body"/>
      <text:p text:style-name="Text_20_body">**What to say:**</text:p>
      <text:p text:style-name="Text_20_body">&gt; "The coordinator sees exactly what's coming. They don't need to call anyone — the status updates automatically as the volunteer moves through their mission."</text:p>
      <text:p text:style-name="Text_20_body"/>
      <text:p text:style-name="Text_20_body"><text:span text:style-name="T1">**Click:**</text:span> "✅ I-verify ang Pagtanggap" on the delivered card → goes to <text:span text:style-name="T4">`org-admin/verify.html`</text:span></text:p>
      <text:p text:style-name="Text_20_body"/>
      <text:p text:style-name="Text_20_body">---</text:p>
      <text:p text:style-name="Text_20_body"/>
      <text:p text:style-name="Text_20_body"><text:span text:style-name="T6">### 4. Verify Screen — </text:span><text:span text:style-name="T4">`org-admin/verify.html`</text:span><text:span text:style-name="T5"> ⭐ </text:span><text:span text:style-name="T6">MVP FEATURE</text:span></text:p>
      <text:p text:style-name="Text_20_body">This is the <text:span text:style-name="T1">**most important screen**</text:span> for this role.</text:p>
      <text:p text:style-name="Text_20_body"/>
      <text:p text:style-name="Text_20_body">#### Mode Toggle at the top:</text:p>
      <text:p text:style-name="Text_20_body">Show the audience the two tabs — <text:span text:style-name="T1">**QR Scanner**</text:span> and <text:span text:style-name="T1">**PIN (Basic)**</text:span>.</text:p>
      <text:p text:style-name="Text_20_body"/>
      <text:p text:style-name="Text_20_body">**What to say:**</text:p>
      <text:p text:style-name="Text_20_body"><text:soft-page-break/>&gt; "The verify screen has two modes. Standard Mode uses the QR code — same technology as the volunteer scanner, but from the receiving end. Basic Mode uses a 4-digit PIN for organizations with old devices or elderly staff."</text:p>
      <text:p text:style-name="Text_20_body"/>
      <text:p text:style-name="Text_20_body">---</text:p>
      <text:p text:style-name="Text_20_body"/>
      <text:p text:style-name="Text_20_body">#### QR Scanner Mode Demo:</text:p>
      <text:p text:style-name="Text_20_body"><text:span text:style-name="T3">1. Make sure you're on the </text:span><text:span text:style-name="T1">**QR Scanner**</text:span><text:span text:style-name="T3"> tab</text:span></text:p>
      <text:p text:style-name="Text_20_body"><text:span text:style-name="T3">2. Tap </text:span><text:span text:style-name="T1">**"📷 Buksan ang Camera"**</text:span></text:p>
      <text:p text:style-name="Text_20_body"><text:span text:style-name="T3">3. Point camera at the volunteer's QR code (from </text:span><text:span text:style-name="T4">`active-mission.html`</text:span><text:span text:style-name="T3"> on another device)</text:span></text:p>
      <text:p text:style-name="Text_20_body"><text:span text:style-name="T3">4. Scan completes → green </text:span><text:span text:style-name="T1">**"✓ Valid na Delivery"**</text:span><text:span text:style-name="T3"> badge appears</text:span></text:p>
      <text:p text:style-name="Text_20_body">5. Show the result rows: food type, quantity, Donor ID, scan timestamp</text:p>
      <text:p text:style-name="Text_20_body"><text:span text:style-name="T3">6. Tap </text:span><text:span text:style-name="T1">**"✅ I-verify ang Pagtanggap"**</text:span></text:p>
      <text:p text:style-name="Text_20_body">7. Show success: "Na-verify na ang Delivery!"</text:p>
      <text:p text:style-name="Text_20_body"/>
      <text:p text:style-name="Text_20_body">**What to say:**</text:p>
      <text:p text:style-name="Text_20_body">&gt; "Once verified, the donor and volunteer both receive a notification. The loop is closed — food reached its destination and it's documented."</text:p>
      <text:p text:style-name="Text_20_body"/>
      <text:p text:style-name="Text_20_body">---</text:p>
      <text:p text:style-name="Text_20_body"/>
      <text:p text:style-name="Text_20_body">#### PIN Mode Demo (switch tabs):</text:p>
      <text:p text:style-name="Text_20_body"><text:span text:style-name="T3">1. Click the </text:span><text:span text:style-name="T1">**"🔢 PIN (Basic)"**</text:span><text:span text:style-name="T3"> tab</text:span></text:p>
      <text:p text:style-name="Text_20_body">2. Show the 4 large digit boxes — easy to tap on any phone</text:p>
      <text:p text:style-name="Text_20_body"><text:span text:style-name="T3">3. Type: </text:span><text:span text:style-name="T1">**</text:span><text:span text:style-name="T4">`1234`</text:span><text:span text:style-name="T1">**</text:span><text:span text:style-name="T3"> (the always-valid demo PIN)</text:span></text:p>
      <text:p text:style-name="Text_20_body"><text:span text:style-name="T3">4. Tap </text:span><text:span text:style-name="T1">**"✅ I-verify gamit ang PIN"**</text:span></text:p>
      <text:p text:style-name="Text_20_body">5. Show success screen</text:p>
      <text:p text:style-name="Text_20_body"/>
      <text:p text:style-name="Text_20_body">**What to say:**</text:p>
      <text:p text:style-name="Text_20_body">&gt; "This mode was designed specifically for elderly staff. No camera, no QR — just a number the volunteer reads aloud. The large digit boxes work with any touchscreen, old or new."</text:p>
      <text:p text:style-name="Text_20_body"><text:soft-page-break/></text:p>
      <text:p text:style-name="Text_20_body">---</text:p>
      <text:p text:style-name="Text_20_body"/>
      <text:p text:style-name="Text_20_body"><text:span text:style-name="T6">### 5. Verified Today Tab — </text:span><text:span text:style-name="T4">`org-admin/index.html`</text:span></text:p>
      <text:p text:style-name="Text_20_body">Go back to the dashboard, click the <text:span text:style-name="T1">**"Na-verify"**</text:span> tab.</text:p>
      <text:p text:style-name="Text_20_body"/>
      <text:p text:style-name="Text_20_body">**What to say:**</text:p>
      <text:p text:style-name="Text_20_body">&gt; "Everything verified today appears here as a clean receipt list. At the end of the day, the coordinator can cross-reference this with their paper logbook."</text:p>
      <text:p text:style-name="Text_20_body"/>
      <text:p text:style-name="Text_20_body">---</text:p>
      <text:p text:style-name="Text_20_body"/>
      <text:p text:style-name="Text_20_body"><text:span text:style-name="T6">### 6. History — </text:span><text:span text:style-name="T4">`org-admin/history.html`</text:span></text:p>
      <text:p text:style-name="Text_20_body">**What to show:**</text:p>
      <text:p text:style-name="Text_20_body">- The 4 summary stats (kg this month, total deliveries, volunteers, average per delivery)</text:p>
      <text:p text:style-name="Text_20_body">- The scrollable list of verified deliveries</text:p>
      <text:p text:style-name="Text_20_body"/>
      <text:p text:style-name="Text_20_body">**What to say:**</text:p>
      <text:p text:style-name="Text_20_body">&gt; "This is the org's impact record. A soup kitchen coordinator can show this to their barangay captain: 42.5 kg of rescued food this month, 15 deliveries, from 4 different volunteers."</text:p>
      <text:p text:style-name="Text_20_body"/>
      <text:p text:style-name="Text_20_body">---</text:p>
      <text:p text:style-name="Text_20_body"/>
      <text:p text:style-name="Text_20_body">## Key Talking Points</text:p>
      <text:p text:style-name="Text_20_body"><text:span text:style-name="T3">1. </text:span><text:span text:style-name="T1">**Org-first registration**</text:span><text:span text:style-name="T3"> — account survives staff turnover; no lost access</text:span></text:p>
      <text:p text:style-name="Text_20_body"><text:span text:style-name="T3">2. </text:span><text:span text:style-name="T1">**Auto device check**</text:span><text:span text:style-name="T3"> — system decides Standard vs Basic; no technical judgment needed</text:span></text:p>
      <text:p text:style-name="Text_20_body"><text:span text:style-name="T3">3. </text:span><text:span text:style-name="T1">**Dual verification modes**</text:span><text:span text:style-name="T3"> — QR for modern devices, PIN for elderly/basic phones</text:span></text:p>
      <text:p text:style-name="Text_20_body"><text:span text:style-name="T3">4. </text:span><text:span text:style-name="T1">**Pending training gate**</text:span><text:span text:style-name="T3"> — org can't receive deliveries until orientation is confirmed</text:span></text:p>
      <text:p text:style-name="Text_20_body"><text:span text:style-name="T3">5. </text:span><text:span text:style-name="T1">**Paper logbook compatible**</text:span><text:span text:style-name="T3"> — PIN column explicitly bridges digital and physical records</text:span></text:p>
      <text:p text:style-name="Text_20_body"/>
      <text:p text:style-name="Text_20_body"><text:soft-page-break/>## Things to Avoid During Demo</text:p>
      <text:p text:style-name="Text_20_body">- Don't try to scan an invalid or random QR — the red badge will appear but the confirm button is disabled. It's correct behavior, but it may confuse the audience if unexpected.</text:p>
      <text:p text:style-name="Text_20_body">- Don't demo PIN with a wrong PIN first (unless intentional to show error handling)</text:p>
      <text:p text:style-name="Text_20_body"><text:span text:style-name="T3">- If camera is unavailable in demo environment, </text:span><text:span text:style-name="T1">**go straight to PIN mode**</text:span><text:span text:style-name="T3"> — it's cleaner</text:span></text:p>
      <text:p text:style-name="Text_20_body"/>
      <text:p text:style-name="Text_20_body">## If Something Goes Wrong</text:p>
      <text:p text:style-name="Text_20_body"/>
      <text:p text:style-name="Text_20_body">| Problem | Fix |</text:p>
      <text:p text:style-name="Text_20_body">|---------|-----|</text:p>
      <text:p text:style-name="Text_20_body">| Camera won't start | Switch to PIN mode tab; demo PIN flow instead |</text:p>
      <text:p text:style-name="Text_20_body">| QR scan shows "Hindi Valid" | Expected if using a non-ResQFood QR — switch to PIN tab |</text:p>
      <text:p text:style-name="Text_20_body">| Delivery card "Verify" button is disabled | That delivery is "enRoute" not "delivered" — click the first card (green border) |</text:p>
      <text:p text:style-name="Text_20_body">| Dashboard shows empty | Navigate directly to <text:span text:style-name="T4">`org-admin/index.html`</text:span> — mock data always loads |</text:p>
      <text:p text:style-name="Text_20_body"/>
      <text:p text:style-name="Text_20_body">## Demo Duration</text:p>
      <text:p text:style-name="Text_20_body">| Segment | Time |</text:p>
      <text:p text:style-name="Text_20_body">|---------|------|</text:p>
      <text:p text:style-name="Text_20_body">| Context setting | 30s |</text:p>
      <text:p text:style-name="Text_20_body">| Registration (highlights only) | 1.5 min |</text:p>
      <text:p text:style-name="Text_20_body">| Dashboard incoming deliveries | 1 min |</text:p>
      <text:p text:style-name="Text_20_body">| <text:span text:style-name="T1">**QR verify demo**</text:span> | <text:span text:style-name="T1">**1.5 min**</text:span> |</text:p>
      <text:p text:style-name="Text_20_body">| <text:span text:style-name="T1">**PIN verify demo**</text:span> | <text:span text:style-name="T1">**1 min**</text:span> |</text:p>
      <text:p text:style-name="Text_20_body">| History summary | 30s |</text:p>
      <text:p text:style-name="Text_20_body">| <text:span text:style-name="T1">**Total**</text:span> | <text:span text:style-name="T1">**~6 min**</text:span> |</text:p>
      <text:p text:style-name="Text_20_body"><text:line-break/></text:p>
      <text:p text:style-name="Text_20_body"># LGU Admin (System Admin) Demo Guide — ResQFood Prototype Presentation</text:p>
      <text:p text:style-name="Text_20_body"/>
      <text:p text:style-name="Text_20_body">## Role Overview</text:p>
      <text:p text:style-name="Text_20_body"><text:soft-page-break/>The <text:span text:style-name="T1">**LGU Admin**</text:span> is the barangay secretary or captain-designated liaison who <text:span text:style-name="T1">**oversees**</text:span> the entire operation.</text:p>
      <text:p text:style-name="Text_20_body">They don't rescue food — they <text:span text:style-name="T1">**monitor, manage, and report**</text:span>. Their audience is the Sanggunian, DILG, or thesis panel.</text:p>
      <text:p text:style-name="Text_20_body">This role answers the question: <text:span text:style-name="T2">*"How do we prove this actually worked?"*</text:span></text:p>
      <text:p text:style-name="Text_20_body"/>
      <text:p text:style-name="Text_20_body">---</text:p>
      <text:p text:style-name="Text_20_body"/>
      <text:p text:style-name="Text_20_body">## Pre-Demo Checklist</text:p>
      <text:p text:style-name="Text_20_body"><text:span text:style-name="T3">- [ ] Open browser to </text:span><text:span text:style-name="T4">`public/register/lgu-invite.html`</text:span><text:span text:style-name="T3"> (or jump to </text:span><text:span text:style-name="T4">`public/admin/index.html`</text:span><text:span text:style-name="T3">)</text:span></text:p>
      <text:p text:style-name="Text_20_body"><text:span text:style-name="T3">- [ ] Use a </text:span><text:span text:style-name="T1">**wider screen**</text:span><text:span text:style-name="T3"> if possible — this dashboard is optimized for tablet/desktop</text:span></text:p>
      <text:p text:style-name="Text_20_body">- [ ] Chart.js loads from CDN — confirm internet connection before the demo</text:p>
      <text:p text:style-name="Text_20_body"><text:span text:style-name="T3">- [ ] Know the demo token: any string of </text:span><text:span text:style-name="T1">**6+ characters**</text:span><text:span text:style-name="T3"> (e.g., </text:span><text:span text:style-name="T4">`LAHUG-2026-DEMO`</text:span><text:span text:style-name="T3">)</text:span></text:p>
      <text:p text:style-name="Text_20_body"><text:span text:style-name="T3">- [ ] Have </text:span><text:span text:style-name="T4">`public/admin/users.html`</text:span><text:span text:style-name="T3"> and </text:span><text:span text:style-name="T4">`public/admin/audit.html`</text:span><text:span text:style-name="T3"> ready as tabs</text:span></text:p>
      <text:p text:style-name="Text_20_body">- [ ] CSV export works without Firebase — test it once before presenting</text:p>
      <text:p text:style-name="Text_20_body"/>
      <text:p text:style-name="Text_20_body">---</text:p>
      <text:p text:style-name="Text_20_body"/>
      <text:p text:style-name="Text_20_body">## Demo Flow (Step-by-Step)</text:p>
      <text:p text:style-name="Text_20_body"/>
      <text:p text:style-name="Text_20_body">### 1. Context Setting — Before You Click Anything</text:p>
      <text:p text:style-name="Text_20_body">**What to say:**</text:p>
      <text:p text:style-name="Text_20_body">&gt; "Every system needs someone accountable. For ResQFood, that's the LGU — specifically a designated barangay official. They don't touch the food. They watch the data, manage the users, and produce the reports that justify the program to the Sanggunian."</text:p>
      <text:p text:style-name="Text_20_body"/>
      <text:p text:style-name="Text_20_body">---</text:p>
      <text:p text:style-name="Text_20_body"/>
      <text:p text:style-name="Text_20_body"><text:span text:style-name="T6">### 2. Registration — </text:span><text:span text:style-name="T4">`register/lgu-invite.html`</text:span></text:p>
      <text:p text:style-name="Text_20_body">This registration is <text:span text:style-name="T1">**invitation-only**</text:span> — no public access.</text:p>
      <text:p text:style-name="Text_20_body"/>
      <text:p text:style-name="Text_20_body"><text:soft-page-break/>**What to say before opening:**</text:p>
      <text:p text:style-name="Text_20_body">&gt; "Notice there's no 'System Admin' option on the role gateway. You can only reach this page via a unique invitation link sent by the ResQFood team. This prevents demo accounts, leaked credentials, and the LGU later claiming they never signed up."</text:p>
      <text:p text:style-name="Text_20_body"/>
      <text:p text:style-name="Text_20_body">Type in the URL bar: <text:span text:style-name="T4">`register/lgu-invite.html`</text:span> (or append <text:span text:style-name="T4">`?token=LAHUG-2026-DEMO`</text:span>)</text:p>
      <text:p text:style-name="Text_20_body"/>
      <text:p text:style-name="Text_20_body">| Step | What to highlight | Time |</text:p>
      <text:p text:style-name="Text_20_body">|------|-------------------|------|</text:p>
      <text:p text:style-name="Text_20_body">| Step 1 — Token | Type <text:span text:style-name="T4">`LAHUG-2026-DEMO`</text:span>, select Lahug. "Token is validated against Firestore. In production, expired or used tokens show an error." | ~20s |</text:p>
      <text:p text:style-name="Text_20_body">| Step 2 — Government Email | Type any email. "In production, this must match the barangay's official domain — e.g., @lahug.barangay.gov.ph. Click send, then 'Email Verified'." | ~25s |</text:p>
      <text:p text:style-name="Text_20_body">| Step 3 — Authorization Letter | Click the upload area, select any file. "The actual signed letter from the Barangay Captain goes here. This is the legal paper trail that prevents the LGU from later disowning the program." Fill in name and password. | ~30s |</text:p>
      <text:p text:style-name="Text_20_body">| Step 4 — MFA + Audit | Type a phone number, send code, type any 6 digits. Then scroll the audit policy — checkbox unlocks at the bottom. "They literally can't check the box without reading it." | ~35s |</text:p>
      <text:p text:style-name="Text_20_body">| Success | Click "Pumunta sa Dashboard" | ~5s |</text:p>
      <text:p text:style-name="Text_20_body"/>
      <text:p text:style-name="Text_20_body"><text:span text:style-name="T1">**Skip shortcut:**</text:span> Navigate directly to <text:span text:style-name="T4">`public/admin/index.html`</text:span></text:p>
      <text:p text:style-name="Text_20_body"/>
      <text:p text:style-name="Text_20_body">---</text:p>
      <text:p text:style-name="Text_20_body"/>
      <text:p text:style-name="Text_20_body"><text:span text:style-name="T6">### 3. Main Dashboard — </text:span><text:span text:style-name="T4">`admin/index.html`</text:span><text:span text:style-name="T5"> ⭐ </text:span><text:span text:style-name="T6">PRIMARY FEATURE</text:span></text:p>
      <text:p text:style-name="Text_20_body">This is the showpiece of the LGU role. Spend the most time here.</text:p>
      <text:p text:style-name="Text_20_body"/>
      <text:p text:style-name="Text_20_body">#### Metrics Cards</text:p>
      <text:p text:style-name="Text_20_body">**What to say:**</text:p>
      <text:p text:style-name="Text_20_body">&gt; "At a glance: 1,247 kg of food rescued, 63 completed missions, 12 beneficiary organizations, 4 active missions right now. This is the sentence the barangay captain needs to stand up in front of the Sanggunian."</text:p>
      <text:p text:style-name="Text_20_body"><text:soft-page-break/></text:p>
      <text:p text:style-name="Text_20_body">Point to the trend delta on each card: "↑ 12% vs last month."</text:p>
      <text:p text:style-name="Text_20_body"/>
      <text:p text:style-name="Text_20_body">#### Date Range Switcher</text:p>
      <text:p text:style-name="Text_20_body">Click each button: <text:span text:style-name="T1">**7 Araw → 30 Araw → Buwang Ito**</text:span>. Watch the numbers update.</text:p>
      <text:p text:style-name="Text_20_body"/>
      <text:p text:style-name="Text_20_body">**What to say:**</text:p>
      <text:p text:style-name="Text_20_body">&gt; "They can cut the data any way they need — for a weekly briefing, a monthly report, or a Sanggunian session. The numbers update instantly."</text:p>
      <text:p text:style-name="Text_20_body"/>
      <text:p text:style-name="Text_20_body">#### Charts (Chart.js)</text:p>
      <text:p text:style-name="Text_20_body">Walk through all three:</text:p>
      <text:p text:style-name="Text_20_body"/>
      <text:p text:style-name="Text_20_body"><text:span text:style-name="T3">1. </text:span><text:span text:style-name="T1">**Bar chart — Food Types**</text:span></text:p>
      <text:p text:style-name="Text_20_body">&gt; "Kanin and gulay are the most rescued. This tells the LGU what types of donors to recruit more of."</text:p>
      <text:p text:style-name="Text_20_body"/>
      <text:p text:style-name="Text_20_body"><text:span text:style-name="T3">2. </text:span><text:span text:style-name="T1">**Doughnut chart — Donor Types**</text:span></text:p>
      <text:p text:style-name="Text_20_body">&gt; "63% of donations come from businesses, 37% from individuals. This informs the fundraising strategy."</text:p>
      <text:p text:style-name="Text_20_body"/>
      <text:p text:style-name="Text_20_body"><text:span text:style-name="T3">3. </text:span><text:span text:style-name="T1">**Line chart — 8-week trend**</text:span></text:p>
      <text:p text:style-name="Text_20_body">&gt; "The program is growing. Week-over-week, more food is being rescued. This is the evidence of momentum."</text:p>
      <text:p text:style-name="Text_20_body"/>
      <text:p text:style-name="Text_20_body">#### Active Missions Table</text:p>
      <text:p text:style-name="Text_20_body">**What to say:**</text:p>
      <text:p text:style-name="Text_20_body">&gt; "This updates in real time. The LGU can see exactly where every active mission is at this moment — who is carrying food, to which organization, what their ETA is."</text:p>
      <text:p text:style-name="Text_20_body"/>
      <text:p text:style-name="Text_20_body">---</text:p>
      <text:p text:style-name="Text_20_body"/>
      <text:p text:style-name="Text_20_body"><text:soft-page-break/><text:span text:style-name="T6">### 4. User Management — </text:span><text:span text:style-name="T4">`admin/users.html`</text:span></text:p>
      <text:p text:style-name="Text_20_body">Click "Pamahalaan ang mga User" in the Quick Actions, or the sidebar.</text:p>
      <text:p text:style-name="Text_20_body"/>
      <text:p text:style-name="Text_20_body">**What to show:**</text:p>
      <text:p text:style-name="Text_20_body">- The full table of 8 mock users</text:p>
      <text:p text:style-name="Text_20_body"><text:span text:style-name="T3">- Filter by </text:span><text:span text:style-name="T1">**"Pending Training"**</text:span><text:span text:style-name="T3"> — show Boyet Cruz</text:span></text:p>
      <text:p text:style-name="Text_20_body"><text:span text:style-name="T3">- Click </text:span><text:span text:style-name="T1">**"Activate"**</text:span><text:span text:style-name="T3"> → row changes to Active badge</text:span></text:p>
      <text:p text:style-name="Text_20_body"><text:span text:style-name="T3">- Filter by </text:span><text:span text:style-name="T1">**"Mga Volunteer"**</text:span><text:span text:style-name="T3"> — show Pedro Diaz (suspended)</text:span></text:p>
      <text:p text:style-name="Text_20_body"><text:span text:style-name="T3">- Click </text:span><text:span text:style-name="T1">**"I-activate"**</text:span><text:span text:style-name="T3"> → restores him</text:span></text:p>
      <text:p text:style-name="Text_20_body"/>
      <text:p text:style-name="Text_20_body">**What to say:**</text:p>
      <text:p text:style-name="Text_20_body">&gt; "The LGU can suspend any user who violates the program rules — a volunteer with repeated no-shows, a donor who posted spoiled food. They can also activate org admins once their orientation is confirmed. Every action is logged."</text:p>
      <text:p text:style-name="Text_20_body"/>
      <text:p text:style-name="Text_20_body"><text:span text:style-name="T1">**View a profile:**</text:span> Click "Tingnan" on any row to open the profile modal.</text:p>
      <text:p text:style-name="Text_20_body"/>
      <text:p text:style-name="Text_20_body">---</text:p>
      <text:p text:style-name="Text_20_body"/>
      <text:p text:style-name="Text_20_body"><text:span text:style-name="T6">### 5. Audit Trail — </text:span><text:span text:style-name="T4">`admin/audit.html`</text:span></text:p>
      <text:p text:style-name="Text_20_body">Navigate to Audit Trail. The suspension from the previous step will appear at the top.</text:p>
      <text:p text:style-name="Text_20_body"/>
      <text:p text:style-name="Text_20_body">**What to say:**</text:p>
      <text:p text:style-name="Text_20_body">&gt; "This log is immutable — no delete button, no edit button, not even for the admin. Every action is timestamped: who did it, what they did, who was affected. This is the Data Privacy Act compliance layer. If a barangay official is ever accused of favoritism, this record proves what they actually did."</text:p>
      <text:p text:style-name="Text_20_body"/>
      <text:p text:style-name="Text_20_body">**Filter demonstration:**</text:p>
      <text:p text:style-name="Text_20_body"><text:span text:style-name="T3">- Click </text:span><text:span text:style-name="T1">**"Suspended"**</text:span><text:span text:style-name="T3"> — shows only suspension events</text:span></text:p>
      <text:p text:style-name="Text_20_body"><text:span text:style-name="T3">- Click </text:span><text:span text:style-name="T1">**"Exports"**</text:span><text:span text:style-name="T3"> — shows report export events</text:span></text:p>
      <text:p text:style-name="Text_20_body"><text:span text:style-name="T3">- Click </text:span><text:span text:style-name="T1">**"Lahat"**</text:span><text:span text:style-name="T3"> — reset</text:span></text:p>
      <text:p text:style-name="Text_20_body"><text:soft-page-break/></text:p>
      <text:p text:style-name="Text_20_body">**Export the CSV:**</text:p>
      <text:p text:style-name="Text_20_body">Click <text:span text:style-name="T1">**"📥 I-export CSV"**</text:span>. File downloads immediately.</text:p>
      <text:p text:style-name="Text_20_body"/>
      <text:p text:style-name="Text_20_body">**What to say:**</text:p>
      <text:p text:style-name="Text_20_body">&gt; "The audit trail is exportable. For a thesis defense or a DILG audit, you hand them this CSV."</text:p>
      <text:p text:style-name="Text_20_body"/>
      <text:p text:style-name="Text_20_body">---</text:p>
      <text:p text:style-name="Text_20_body"/>
      <text:p text:style-name="Text_20_body"><text:span text:style-name="T6">### 6. Donations View — </text:span><text:span text:style-name="T4">`admin/donations.html`</text:span></text:p>
      <text:p text:style-name="Text_20_body">Brief visit.</text:p>
      <text:p text:style-name="Text_20_body"/>
      <text:p text:style-name="Text_20_body">**What to show:**</text:p>
      <text:p text:style-name="Text_20_body"><text:span text:style-name="T3">- Filter to </text:span><text:span text:style-name="T1">**"Verified"**</text:span><text:span text:style-name="T3"> — the completed, closed donations</text:span></text:p>
      <text:p text:style-name="Text_20_body"><text:span text:style-name="T3">- Filter to </text:span><text:span text:style-name="T1">**"En Route"**</text:span><text:span text:style-name="T3"> — currently in progress</text:span></text:p>
      <text:p text:style-name="Text_20_body"><text:span text:style-name="T3">- Click </text:span><text:span text:style-name="T1">**"📥 I-export CSV"**</text:span><text:span text:style-name="T3"> — downloads immediately</text:span></text:p>
      <text:p text:style-name="Text_20_body"/>
      <text:p text:style-name="Text_20_body">**What to say:**</text:p>
      <text:p text:style-name="Text_20_body">&gt; "This is the raw data — every donation, who donated it, who delivered it, which organization received it, and the final status. This is what goes to DILG for filing."</text:p>
      <text:p text:style-name="Text_20_body"/>
      <text:p text:style-name="Text_20_body">---</text:p>
      <text:p text:style-name="Text_20_body"/>
      <text:p text:style-name="Text_20_body">### 7. CSV Export from Dashboard</text:p>
      <text:p text:style-name="Text_20_body">Go back to <text:span text:style-name="T4">`admin/index.html`</text:span> and click <text:span text:style-name="T1">**"📥 I-export ang CSV"**</text:span> in Quick Actions.</text:p>
      <text:p text:style-name="Text_20_body"/>
      <text:p text:style-name="Text_20_body">**What to say:**</text:p>
      <text:p text:style-name="Text_20_body">&gt; "One click. The report is in their Downloads folder. No printing, no manual encoding. Ready for Excel or DILG submission."</text:p>
      <text:p text:style-name="Text_20_body"/>
      <text:p text:style-name="Text_20_body"><text:soft-page-break/>---</text:p>
      <text:p text:style-name="Text_20_body"/>
      <text:p text:style-name="Text_20_body">## Key Talking Points</text:p>
      <text:p text:style-name="Text_20_body"><text:span text:style-name="T3">1. </text:span><text:span text:style-name="T1">**Invitation-only access**</text:span><text:span text:style-name="T3"> — eliminates the "anyone can be admin" security failure</text:span></text:p>
      <text:p text:style-name="Text_20_body"><text:span text:style-name="T3">2. </text:span><text:span text:style-name="T1">**Authorization letter upload**</text:span><text:span text:style-name="T3"> — creates institutional accountability; the captain signed it</text:span></text:p>
      <text:p text:style-name="Text_20_body"><text:span text:style-name="T3">3. </text:span><text:span text:style-name="T1">**MFA enrollment**</text:span><text:span text:style-name="T3"> — mandatory, no skip button; protects high-privilege access</text:span></text:p>
      <text:p text:style-name="Text_20_body"><text:span text:style-name="T3">4. </text:span><text:span text:style-name="T1">**Scroll-gated audit acknowledgment**</text:span><text:span text:style-name="T3"> — DPA compliance; admin cannot claim ignorance</text:span></text:p>
      <text:p text:style-name="Text_20_body"><text:span text:style-name="T3">5. </text:span><text:span text:style-name="T1">**Immutable audit trail**</text:span><text:span text:style-name="T3"> — anti-corruption layer; every action is on record</text:span></text:p>
      <text:p text:style-name="Text_20_body"><text:span text:style-name="T3">6. </text:span><text:span text:style-name="T1">**One-click CSV/PDF export**</text:span><text:span text:style-name="T3"> — Sanggunian presentation is built into the dashboard</text:span></text:p>
      <text:p text:style-name="Text_20_body"><text:span text:style-name="T3">7. </text:span><text:span text:style-name="T1">**Real-time active missions**</text:span><text:span text:style-name="T3"> — LGU always knows where the food is</text:span></text:p>
      <text:p text:style-name="Text_20_body"/>
      <text:p text:style-name="Text_20_body">## Things to Avoid During Demo</text:p>
      <text:p text:style-name="Text_20_body">- Don't try to show PDF export (requires html2canvas/jspdf which may need installation) — use CSV instead</text:p>
      <text:p text:style-name="Text_20_body">- Don't navigate to the dashboard before loading Chart.js from CDN — check internet first</text:p>
      <text:p text:style-name="Text_20_body">- Don't demo on a mobile phone — the sidebar nav hides on small screens; use tablet or laptop</text:p>
      <text:p text:style-name="Text_20_body"/>
      <text:p text:style-name="Text_20_body">## If Something Goes Wrong</text:p>
      <text:p text:style-name="Text_20_body"/>
      <text:p text:style-name="Text_20_body">| Problem | Fix |</text:p>
      <text:p text:style-name="Text_20_body">|---------|-----|</text:p>
      <text:p text:style-name="Text_20_body">| Charts don't render | Check internet (CDN). Say: "In production these use live Firestore data. The charts will render once CDN loads." |</text:p>
      <text:p text:style-name="Text_20_body">| CSV downloads but is blank | Try a different browser; Blob/URL.createObjectURL works in Chrome/Firefox |</text:p>
      <text:p text:style-name="Text_20_body">| Sidebar not visible | Screen is too narrow; zoom out or use a wider window |</text:p>
      <text:p text:style-name="Text_20_body">| User table doesn't update after suspend | Refresh the page — mock data resets; explain the action is logged in the audit trail |</text:p>
      <text:p text:style-name="Text_20_body"/>
      <text:p text:style-name="Text_20_body">## Suggested Presentation Script (60-second version)</text:p>
      <text:p text:style-name="Text_20_body"><text:soft-page-break/>&gt; "ResQFood's LGU dashboard answers the accountability question. [Show metrics.] This month, Barangay Lahug rescued 1,247 kg of food through 63 volunteer missions, serving 12 organizations. [Show chart.] The breakdown shows which food types dominate and whether the program is growing week-over-week. [Switch to users.html] The LGU can manage all users — suspend bad actors, activate new organizations. [Switch to audit.html] Every action is logged permanently. This is the Data Privacy Act layer. [Export CSV] One click for a DILG-ready report."</text:p>
      <text:p text:style-name="Text_20_body"/>
      <text:p text:style-name="Text_20_body">---</text:p>
      <text:p text:style-name="Text_20_body"/>
      <text:p text:style-name="Text_20_body">## Demo Duration</text:p>
      <text:p text:style-name="Text_20_body">| Segment | Time |</text:p>
      <text:p text:style-name="Text_20_body">|---------|------|</text:p>
      <text:p text:style-name="Text_20_body">| Context + invitation-only explanation | 30s |</text:p>
      <text:p text:style-name="Text_20_body">| Registration highlights | 2 min |</text:p>
      <text:p text:style-name="Text_20_body">| <text:span text:style-name="T1">**Dashboard — metrics + charts**</text:span> | <text:span text:style-name="T1">**2 min**</text:span> |</text:p>
      <text:p text:style-name="Text_20_body">| User management + suspend/activate | 1.5 min |</text:p>
      <text:p text:style-name="Text_20_body">| Audit trail + CSV export | 1 min |</text:p>
      <text:p text:style-name="Text_20_body">| Donations view | 30s |</text:p>
      <text:p text:style-name="Text_20_body">| <text:span text:style-name="T1">**Total**</text:span> | <text:span text:style-name="T1">**~7.5 min**</text:span> |</text:p>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PH"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1T22:38:44.075016160</meta:creation-date>
    <dc:date>2026-06-01T22:43:11.820683637</dc:date>
    <meta:editing-duration>PT4M31S</meta:editing-duration>
    <meta:editing-cycles>1</meta:editing-cycles>
    <meta:document-statistic meta:table-count="0" meta:image-count="0" meta:object-count="0" meta:page-count="22" meta:paragraph-count="425" meta:word-count="4305" meta:character-count="26000" meta:non-whitespace-character-count="22001"/>
    <meta:generator>LibreOffice/24.2.7.2$Linux_X86_64 LibreOffice_project/420$Build-2</meta:generator>
  </office:meta>
</office:document-meta>
</file>